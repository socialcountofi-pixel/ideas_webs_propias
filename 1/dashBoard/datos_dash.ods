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c9211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9.164cm" svg:height="5.154cm" svg:x="9.194cm" svg:y="0.1cm">
            <draw:object draw:notify-on-update-of-ranges="Hoja1.A1:Hoja1.A1 Hoja1.A2:Hoja1.A11 Hoja1.B1:Hoja1.B1 Hoja1.B2:Hoja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okem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1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2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6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7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cion 9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SUM([.B2:.B10])" office:value-type="float" office:value="795" calcext:value-type="float">
            <text:p>795</text:p>
          </table:table-cell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4:41:17.012145000</meta:creation-date>
    <dc:date>2026-02-13T14:45:09.991220800</dc:date>
    <meta:editing-duration>PT3M53S</meta:editing-duration>
    <meta:editing-cycles>1</meta:editing-cycles>
    <meta:document-statistic meta:table-count="1" meta:cell-count="20" meta:object-count="1"/>
    <meta:generator>LibreOffice/25.2.7.2$Windows_X86_64 LibreOffice_project/5cbfd1ab6520636bb5f7b99185aa69bd7456825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165cm" svg:height="5.155cm" xlink:href=".." xlink:type="simple" chart:class="chart:circle" chart:style-name="ch1">
        <chart:title svg:x="3.083cm" svg:y="0.238cm" chart:style-name="ch2">
          <text:p>Generaciones</text:p>
        </chart:title>
        <chart:legend chart:legend-position="end" svg:x="3.541cm" svg:y="1.279cm" style:legend-expansion="high" chart:style-name="ch3"/>
        <chart:plot-area chart:style-name="ch4" svg:x="0.35cm" svg:y="1.377cm" svg:width="2.841cm" svg:height="3.42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2.239cm" svg:width="2.841cm" svg:height="1.7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2:Hoja1.A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.B2:Hoja1.B11" chart:label-cell-address="Hoja1.B1:Hoja1.B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kemon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racion 1</text:p>
                <draw:g>
                  <svg:desc>Hoja1.A2:Hoja1.A11</svg:desc>
                </draw:g>
              </table:table-cell>
              <table:table-cell office:value-type="float" office:value="123">
                <text:p>123</text:p>
                <draw:g>
                  <svg:desc>Hoja1.B2:Hoja1.B11</svg:desc>
                </draw:g>
              </table:table-cell>
            </table:table-row>
            <table:table-row>
              <table:table-cell office:value-type="string">
                <text:p>Generacion 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eneracion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cion 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neracion 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Generacion 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Generacion 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Generacion 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cion 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">
                <text:p>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opacity draw:name="ChartTransparencyGradient_20_1" draw:display-name="ChartTransparencyGradient 1" draw:style="square" draw:cx="50%" draw:cy="50%" draw:start="100%" draw:end="0%" draw:angle="0deg" draw:border="0%">
      <loext:opacity-stop svg:offset="0" svg:stop-opacity="1"/>
      <loext:opacity-stop svg:offset="1" svg:stop-opacity="0"/>
    </draw:opacity>
  </office:styles>
</office:document-styles>
</file>